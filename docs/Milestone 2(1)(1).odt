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3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Milestone 2</text:p>
      <text:p text:style-name="P2"/>
      <text:p text:style-name="P3">This<text:s/>document<text:s/>talks<text:s/>about<text:s/>the<text:s/>brief and execution for when the app is deployed</text:p>
      <text:p text:style-name="P4"/>
      <text:p text:style-name="P5">The goal is<text:s/>not to<text:s/>ensure everyone knows what to do</text:p>
      <text:p text:style-name="P6"/>
      <text:p text:style-name="P7">Kotter step 5 : remove obstacles</text:p>
      <text:p text:style-name="P8"/>
      <text:p text:style-name="P9">The biggest obstacles<text:s/>is fear fearof using<text:s/>technology<text:s/>, fear being<text:s/>monitored, no<text:s/>comfortable<text:s/>, cannot<text:s/>remember<text:s/>login</text:p>
      <text:p text:style-name="P10"/>
      <text:p text:style-name="P11">Well my solution for you very easy to use modern ui<text:s/></text:p>
      <text:p text:style-name="P12">Show them that<text:s/>sensitive<text:s/>data is secure</text:p>
      <text:p text:style-name="P13">One on one trying<text:s/>to better help use the technology</text:p>
      <text:p text:style-name="P14">Show first<text:s/>payroll is<text:s/>calculated<text:s/>in<text:s/>literally<text:s/>seconds</text:p>
      <text:p text:style-name="P15"/>
      <text:p text:style-name="P16">Step<text:s/>6 short term wins</text:p>
      <text:p text:style-name="P17"><text:s/>Week 1 first<text:s/>payroll<text:s/>calculated<text:s/>automatically<text:s/>in<text:s/>seconds</text:p>
      <text:p text:style-name="P18"/>
      <text:p text:style-name="P19">Week 2 users can pay by using stripe which is<text:s/>quick<text:s/>and easy</text:p>
      <text:p text:style-name="P20">Week 3 staff view their own shit<text:s/>history<text:s/>for<text:s/>the<text:s/>first itme</text:p>
      <text:p text:style-name="P21">Week 4 first kpi<text:s/>dashboard<text:s/>review with yoyo</text:p>
      <text:p text:style-name="P22"/>
      <text:p text:style-name="P23"/>
      <text:p text:style-name="P24"/>
      <text:p text:style-name="P25">Communicaiton plan<text:s/></text:p>
      <text:p text:style-name="P26"/>
      <text:p text:style-name="P27">Week by weke timeline</text:p>
      <text:p text:style-name="P28">Announce the<text:s/>update<text:s/>and<text:s/>chnage siot th estaf</text:p>
      <text:p text:style-name="P29">Live<text:s/>demo<text:s/>of check<text:s/>in check out</text:p>
      <text:p text:style-name="P30">Manager training</text:p>
      <text:p text:style-name="P31">Individual<text:s/>sessions<text:s/>for resistant<text:s/>staff</text:p>
      <text:p text:style-name="P32"/>
      <text:p text:style-name="P33">Support Plan<text:s/></text:p>
      <text:p text:style-name="P34"/>
      <text:p text:style-name="P35">Support is available during the<text:s/>first month<text:s/>to<text:s/>ensure<text:s/>no one is left<text:s/>behind<text:s/></text:p>
      <text:p text:style-name="P36">Manual check<text:s/>in by<text:s/>managers to staff’</text:p>
      <text:p text:style-name="Normal"><text:span text:style-name="T37">Weekly<text:s/></text:span><text:span text:style-name="T38">check</text:span><text:span text:style-name="T39"><text:s/>in meeting feedba</text:span><text:span text:style-name="T40">ck<text:s/></text:span><text:span text:style-name="T41">bo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Zaylaa</meta:initial-creator>
    <dc:creator>Elie Zaylaa</dc:creator>
    <meta:creation-date>2026-06-06T09:56:00Z</meta:creation-date>
    <dc:date>2026-06-06T09:56:00Z</dc:date>
    <meta:template xlink:href="Normal.dotm" xlink:type="simple"/>
    <meta:editing-cycles>1</meta:editing-cycles>
    <meta:editing-duration>PT0S</meta:editing-duration>
    <meta:document-statistic meta:page-count="1" meta:paragraph-count="2" meta:word-count="163" meta:character-count="1091" meta:row-count="7" meta:non-whitespace-character-count="930"/>
  </office:meta>
</office:document-meta>
</file>