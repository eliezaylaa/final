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Milestone 3 After</text:p>
      <text:p text:style-name="P2"/>
      <text:p text:style-name="P3">Sustaining <text:s/>and<text:s/>long term success</text:p>
      <text:p text:style-name="P4"/>
      <text:p text:style-name="P5">When everything<text:s/>goes live it doesn’t<text:s/>mean our task is done our goal is to have along lasting success</text:p>
      <text:p text:style-name="P6"><text:s/>Kotter step 7 continue winning</text:p>
      <text:p text:style-name="P7"><text:s/>After our initial<text:s/><text:s/>win we continue to rise after week 1</text:p>
      <text:p text:style-name="P8"/>
      <text:p text:style-name="P9">Review focus</text:p>
      <text:p text:style-name="P10">Month 1 adoption<text:s/>rate<text:s/>first<text:s/>impressions<text:s text:c="2"/>our<text:s/>goal<text:s/>is to address issues<text:s/>immediately</text:p>
      <text:p text:style-name="P11"/>
      <text:p text:style-name="P12">Month 3 staff<text:s/>satisfaction survey <text:s/>our action is to celebrate<text:s/>publicly</text:p>
      <text:p text:style-name="P13">Month 6 annual review + feature planning<text:s/>plan the<text:s/>next<text:s/>improvements</text:p>
      <text:p text:style-name="P14"/>
      <text:p text:style-name="P15">Kotter step 8 <text:s/>Digital is the new<text:s/><text:s/>culture<text:s/>everything digital should<text:s/>become the new way to adapt for what is for us</text:p>
      <text:p text:style-name="P16"/>
      <text:p text:style-name="P17">How to adapt to<text:s/>the change</text:p>
      <text:p text:style-name="P18"/>
      <text:p text:style-name="P19">Include<text:s/>app usage or all new hires</text:p>
      <text:p text:style-name="P20">Make<text:s/>check<text:s/>in clear and<text:s/>required<text:s/>no<text:s/>check<text:s/>in mean no shift verification</text:p>
      <text:p text:style-name="P21">Managers<text:s/>refence the<text:s/>dashboard in all shift planning</text:p>
      <text:p text:style-name="P22"/>
      <text:p text:style-name="P23">Yoyo<text:s/>reviews<text:s/>kpis making it part of his daily rythm</text:p>
      <text:p text:style-name="P24"/>
      <text:p text:style-name="P25">Celebrate<text:s/>milestones<text:s/>enjoy the little things</text:p>
      <text:p text:style-name="P26"/>
      <text:p text:style-name="P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ie Zaylaa</meta:initial-creator>
    <dc:creator>Elie Zaylaa</dc:creator>
    <meta:creation-date>2026-06-06T09:44:00Z</meta:creation-date>
    <dc:date>2026-06-06T09:44:00Z</dc:date>
    <meta:template xlink:href="Normal.dotm" xlink:type="simple"/>
    <meta:editing-cycles>1</meta:editing-cycles>
    <meta:editing-duration>PT0S</meta:editing-duration>
    <meta:document-statistic meta:page-count="1" meta:paragraph-count="1" meta:word-count="132" meta:character-count="887" meta:row-count="6" meta:non-whitespace-character-count="756"/>
  </office:meta>
</office:document-meta>
</file>