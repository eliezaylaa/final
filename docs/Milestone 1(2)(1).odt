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Milestone 1 before implementation</text:p>
      <text:p text:style-name="P2"/>
      <text:p text:style-name="P3">Before we<text:s/>deploy<text:s/>any<text:s/>system<text:s/>we need to<text:s/>talk<text:s/>about everything<text:s/>first of<text:s/>all this<text:s/>document<text:s/>defines what needed<text:s/>for<text:s/>change<text:s/><text:s/>the strategy<text:s/>to make the<text:s/>transition welcome</text:p>
      <text:p text:style-name="P4"/>
      <text:p text:style-name="P5">Step 1 Create<text:s/>a sense of urgency</text:p>
      <text:p text:style-name="P6">We need to shed a light<text:s/>on<text:s/>the<text:s/>people<text:s/>or there not<text:s/>gonna<text:s/>be any change<text:s/></text:p>
      <text:p text:style-name="P7">Pain points</text:p>
      <text:p text:style-name="P8"/>
      <text:p text:style-name="P9">Bouncers use<text:s/>page notebooks</text:p>
      <text:p text:style-name="P10">Managers spend 3 hours calculating payrolls</text:p>
      <text:p text:style-name="P11">Employees forget where<text:s/>their<text:s/>shift begins<text:s/>customers<text:s/>invoices<text:s/>are<text:s/>handwritten</text:p>
      <text:p text:style-name="P12"/>
      <text:p text:style-name="P13">The<text:s/>damages:</text:p>
      <text:p text:style-name="P14">300 <text:s/>euros<text:s/><text:s/>payroll<text:s/>errors</text:p>
      <text:p text:style-name="P15">200 euros<text:s/>lost<text:s/>shift<text:s/>records</text:p>
      <text:p text:style-name="P16">No kpi data missed<text:s/>revenue</text:p>
      <text:p text:style-name="P17"/>
      <text:p text:style-name="P18">Step 2 :<text:s/>Build<text:s/>a strong team</text:p>
      <text:p text:style-name="P19"/>
      <text:p text:style-name="P20">Change<text:s/>cannot<text:s/>begin<text:s/>with one<text:s/>person<text:s/>you need to have a strong team behind you</text:p>
      <text:p text:style-name="P21"/>
      <text:p text:style-name="P22">Our team:</text:p>
      <text:p text:style-name="P23">Yoyo</text:p>
      <text:p text:style-name="P24">Managers</text:p>
      <text:p text:style-name="P25">Employees Bouncers</text:p>
      <text:p text:style-name="P26">And Users Customers</text:p>
      <text:p text:style-name="P27"/>
      <text:p text:style-name="P28">Step 3 Form a plan</text:p>
      <text:p text:style-name="P29"/>
      <text:p text:style-name="P30">30 day plan to use the app</text:p>
      <text:p text:style-name="P31">Zero payroll<text:s/>error</text:p>
      <text:p text:style-name="P32">Live kpi dashboard</text:p>
      <text:p text:style-name="P33"/>
      <text:p text:style-name="P34">Step 4: Staff meeting</text:p>
      <text:p text:style-name="P35">TO the<text:s/>employees<text:s/>this<text:s/>is the best<text:s/>way<text:s/>to check your revenue and<text:s/>check<text:s/>in<text:s/>check<text:s/>out</text:p>
      <text:p text:style-name="P36"/>
      <text:p text:style-name="P37"/>
      <text:p text:style-name="P38">Managers you are responsible for<text:s/>your employees , you can fire<text:s/>if<text:s/>anyone<text:s/>isn't<text:s/>following<text:s/>our<text:s/>standards,</text:p>
      <text:p text:style-name="P39"/>
      <text:p text:style-name="P40">To yoyo you<text:s/>have full<text:s/>control<text:s/>over the site</text:p>
      <text:p text:style-name="P41"/>
      <text:p text:style-name="P42">Communications<text:s/>Team<text:s/>meetings<text:s/>everyday</text:p>
      <text:p text:style-name="P43">Private conversations</text:p>
      <text:p text:style-name="Normal"><text:span text:style-name="T44">Indi</text:span><text:span text:style-name="T45">vidual calling and quick reference card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ie Zaylaa</meta:initial-creator>
    <dc:creator>Elie Zaylaa</dc:creator>
    <meta:creation-date>2026-06-06T09:50:00Z</meta:creation-date>
    <dc:date>2026-06-06T09:50:00Z</dc:date>
    <meta:template xlink:href="Normal.dotm" xlink:type="simple"/>
    <meta:editing-cycles>1</meta:editing-cycles>
    <meta:editing-duration>PT0S</meta:editing-duration>
    <meta:document-statistic meta:page-count="1" meta:paragraph-count="2" meta:word-count="177" meta:character-count="1184" meta:row-count="8" meta:non-whitespace-character-count="1009"/>
  </office:meta>
</office:document-meta>
</file>